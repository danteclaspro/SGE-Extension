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6000001315DFD2190.png" manifest:media-type="image/png"/>
  <manifest:file-entry manifest:full-path="Pictures/1000000000000064000000647CED8046.jpg" manifest:media-type="image/jpeg"/>
  <manifest:file-entry manifest:full-path="Pictures/1000000100000252000001762BB8AB88.png" manifest:media-type="image/png"/>
  <manifest:file-entry manifest:full-path="Pictures/10000001000003C8000001578E2A5A40.png" manifest:media-type="image/png"/>
  <manifest:file-entry manifest:full-path="Pictures/100000000000006400000064B778BDCA.jpg" manifest:media-type="image/jpeg"/>
  <manifest:file-entry manifest:full-path="Pictures/10000001000002CA000002904D94B8EA.png" manifest:media-type="image/png"/>
  <manifest:file-entry manifest:full-path="Pictures/100000000000006400000064061EA5CF.jpg" manifest:media-type="image/jpeg"/>
  <manifest:file-entry manifest:full-path="Pictures/1000000100000355000000E1F89E6C5E.png" manifest:media-type="image/png"/>
  <manifest:file-entry manifest:full-path="Pictures/100000010000004C0000004168BE4A04.png" manifest:media-type="image/png"/>
  <manifest:file-entry manifest:full-path="Pictures/10000001000000800000008062D06EFE.png" manifest:media-type="image/png"/>
  <manifest:file-entry manifest:full-path="Pictures/10000001000001B900000277AC4E1E40.png" manifest:media-type="image/png"/>
  <manifest:file-entry manifest:full-path="Pictures/100000010000025700000333561B8288.png" manifest:media-type="image/png"/>
  <manifest:file-entry manifest:full-path="Pictures/10000001000002D400000110187BA85E.png" manifest:media-type="image/png"/>
  <manifest:file-entry manifest:full-path="Pictures/10000001000002CC0000018B201B86CE.png" manifest:media-type="image/png"/>
  <manifest:file-entry manifest:full-path="Pictures/1000000100000056000000564E919336.png" manifest:media-type="image/png"/>
  <manifest:file-entry manifest:full-path="Pictures/10000001000002AC000001042639F9AE.png" manifest:media-type="image/png"/>
  <manifest:file-entry manifest:full-path="Pictures/100000010000028B000000F3AA0BB012.png" manifest:media-type="image/png"/>
  <manifest:file-entry manifest:full-path="Pictures/10000001000001A50000013242CE3D32.png" manifest:media-type="image/png"/>
  <manifest:file-entry manifest:full-path="Pictures/10000001000000F80000011E9251030F.png" manifest:media-type="image/png"/>
  <manifest:file-entry manifest:full-path="Pictures/10000001000004D60000028543279E27.png" manifest:media-type="image/png"/>
  <manifest:file-entry manifest:full-path="Pictures/1000000100000330000001D15049BF70.png" manifest:media-type="image/png"/>
  <manifest:file-entry manifest:full-path="Pictures/10000001000003680000015CC283182B.png" manifest:media-type="image/png"/>
  <manifest:file-entry manifest:full-path="Pictures/10000001000003C40000018EA197FE30.png" manifest:media-type="image/png"/>
  <manifest:file-entry manifest:full-path="Pictures/10000001000004C60000032FC2FBDC28.png" manifest:media-type="image/png"/>
  <manifest:file-entry manifest:full-path="Pictures/10000001000002300000031DDF7B36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587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937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2a6099" draw:auto-grow-height="true" draw:auto-grow-width="false" fo:min-height="1.02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7.77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1.979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00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1.483cm" fo:padding-top="0.151cm" fo:padding-bottom="0.151cm" fo:padding-left="0.276cm" fo:padding-right="0.276cm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49cm, 0.171cm, 0.25cm)" draw:image-opacity="100%" style:mirror="none" loext:decorative="fals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98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49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2.248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5.09cm" fo:padding-top="0.151cm" fo:padding-bottom="0.151cm" fo:padding-left="0.276cm" fo:padding-right="0.276cm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93cm, 0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81cm)" draw:image-opacity="100%" style:mirror="none"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009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28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2.01cm" fo:padding-top="0.151cm" fo:padding-bottom="0.151cm" fo:padding-left="0.276cm" fo:padding-right="0.276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30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2.205cm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042cm" fo:min-width="1.281cm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svg:stroke-width="0.053cm" svg:stroke-color="#ff8000" draw:marker-start-width="0.279cm" draw:marker-end-width="0.279cm" draw:opacity="0%" draw:textarea-horizontal-align="justify" draw:textarea-vertical-align="middle" draw:auto-grow-height="false" fo:min-height="0.057cm" fo:min-width="5.336cm" fo:padding-top="0.151cm" fo:padding-bottom="0.151cm" fo:padding-left="0.276cm" fo:padding-right="0.276cm" loext:decorative="false"/>
    </style:style>
    <style:style style:name="gr33" style:family="graphic" style:parent-style-name="standard">
      <style:graphic-properties svg:stroke-width="0.053cm" svg:stroke-color="#ff8000" draw:marker-start-width="0.279cm" draw:marker-end-width="0.279cm" draw:opacity="0%" draw:textarea-horizontal-align="justify" draw:textarea-vertical-align="middle" draw:auto-grow-height="false" fo:min-height="0.137cm" fo:min-width="1.434cm" fo:padding-top="0.151cm" fo:padding-bottom="0.151cm" fo:padding-left="0.276cm" fo:padding-right="0.276cm"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73cm" loext:decorative="false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1.5cm" loext:decorative="fals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2.912cm" loext:decorative="false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38" style:family="graphic">
      <style:graphic-properties style:writing-mode="lr-tb" loext:decorative="false"/>
    </style:style>
    <style:style style:name="gr39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5cm" fo:min-width="0cm" fo:padding-top="0.151cm" fo:padding-bottom="0.151cm" fo:padding-left="0.276cm" fo:padding-right="0.276cm" loext:decorative="false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0.044cm" fo:min-width="1.987cm" loext:decorative="false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044cm" fo:min-width="3.719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044cm" fo:min-width="2.671cm" loext:decorative="false"/>
    </style:style>
    <style:style style:name="gr43" style:family="graphic" style:parent-style-name="standard">
      <style:graphic-properties svg:stroke-width="0.053cm" svg:stroke-color="#ff8000" draw:marker-start-width="0.279cm" draw:marker-end-width="0.279cm" draw:opacity="0%" draw:textarea-horizontal-align="justify" draw:textarea-vertical-align="middle" draw:auto-grow-height="false" fo:min-height="0.12cm" fo:min-width="0.468cm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0.12cm" fo:min-width="1.558cm" fo:padding-top="0.151cm" fo:padding-bottom="0.151cm" fo:padding-left="0.276cm" fo:padding-right="0.276cm" loext:decorative="false"/>
    </style:style>
    <style:style style:name="gr45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0.137cm" fo:min-width="1.471cm" fo:padding-top="0.151cm" fo:padding-bottom="0.151cm" fo:padding-left="0.276cm" fo:padding-right="0.276cm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77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97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3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561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4.198cm" loext:decorative="fals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121cm" fo:min-width="3.445cm" loext:decorative="false"/>
    </style:style>
    <style:style style:name="gr53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251cm" fo:min-width="3.177cm" fo:padding-top="0.151cm" fo:padding-bottom="0.151cm" fo:padding-left="0.276cm" fo:padding-right="0.276cm" loext:decorative="false"/>
    </style:style>
    <style:style style:name="gr54" style:family="graphic" style:parent-style-name="standard">
      <style:graphic-properties svg:stroke-width="0.053cm" svg:stroke-color="#ff8000" draw:marker-start-width="0.279cm" draw:marker-end-width="0.279cm" draw:opacity="0%" draw:textarea-horizontal-align="justify" draw:textarea-vertical-align="middle" draw:auto-grow-height="false" fo:min-height="0.221cm" fo:min-width="4.361cm" fo:padding-top="0.151cm" fo:padding-bottom="0.151cm" fo:padding-left="0.276cm" fo:padding-right="0.276cm" loext:decorative="false"/>
    </style:style>
    <style:style style:name="gr55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211cm" fo:min-width="0cm" fo:padding-top="0.151cm" fo:padding-bottom="0.151cm" fo:padding-left="0.276cm" fo:padding-right="0.276cm" loext:decorative="false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9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58" style:family="graphic" style:parent-style-name="standard">
      <style:graphic-properties draw:stroke="none" draw:fill="solid" draw:fill-color="#404040" loext:fill-use-slide-background="false" draw:textarea-horizontal-align="justify" draw:textarea-vertical-align="middle" draw:auto-grow-height="false" fo:min-height="0.284cm" fo:min-width="0.061cm" loext:decorative="false"/>
    </style:style>
    <style:style style:name="gr59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512cm" fo:min-width="6.155cm" fo:padding-top="0.151cm" fo:padding-bottom="0.151cm" fo:padding-left="0.276cm" fo:padding-right="0.276cm" loext:decorative="false"/>
    </style:style>
    <style:style style:name="gr60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373cm" fo:min-width="0.088cm" fo:padding-top="0.151cm" fo:padding-bottom="0.151cm" fo:padding-left="0.276cm" fo:padding-right="0.276cm" loext:decorative="false"/>
    </style:style>
    <style:style style:name="gr61" style:family="graphic" style:parent-style-name="standard">
      <style:graphic-properties draw:stroke="none" draw:fill="solid" draw:fill-color="#404040" loext:fill-use-slide-background="false" draw:textarea-horizontal-align="justify" draw:textarea-vertical-align="middle" draw:auto-grow-height="false" fo:min-height="0.291cm" fo:min-width="0.179cm" loext:decorative="false"/>
    </style:style>
    <style:style style:name="gr6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945cm" fo:min-width="2.285cm" fo:padding-top="0.151cm" fo:padding-bottom="0.151cm" fo:padding-left="0.276cm" fo:padding-right="0.276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1cm, 0cm, 0cm, 0.238cm)" draw:image-opacity="100%" style:mirror="none" loext:decorative="false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97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68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2.229cm" fo:padding-top="0.151cm" fo:padding-bottom="0.151cm" fo:padding-left="0.276cm" fo:padding-right="0.276cm" loext:decorative="false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73cm" loext:decorative="false"/>
      <style:paragraph-properties style:writing-mode="lr-tb"/>
    </style:style>
    <style:style style:name="gr7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387cm" fo:min-width="0.623cm" fo:padding-top="0.151cm" fo:padding-bottom="0.151cm" fo:padding-left="0.276cm" fo:padding-right="0.276cm" loext:decorative="false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97cm" loext:decorative="false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196cm, 0cm)" draw:image-opacity="100%" style:mirror="none" loext:decorative="false"/>
    </style:style>
    <style:style style:name="gr75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3.937cm" fo:padding-top="0.151cm" fo:padding-bottom="0.151cm" fo:padding-left="0.276cm" fo:padding-right="0.276cm" loext:decorative="false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609cm" loext:decorative="false"/>
      <style:paragraph-properties style:writing-mode="lr-tb"/>
    </style:style>
    <style:style style:name="gr79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3.37cm" fo:padding-top="0.151cm" fo:padding-bottom="0.151cm" fo:padding-left="0.276cm" fo:padding-right="0.276cm" loext:decorative="false"/>
    </style:style>
    <style:style style:name="gr80" style:family="graphic" style:parent-style-name="standard">
      <style:graphic-properties svg:stroke-width="0.018cm" svg:stroke-color="#808080" draw:marker-start-width="0.227cm" draw:marker-end-width="0.227cm" draw:fill-color="#ffffff" draw:textarea-horizontal-align="justify" draw:textarea-vertical-align="middle" draw:auto-grow-height="false" fo:min-height="7.482cm" fo:min-width="10.132cm" fo:padding-top="0.134cm" fo:padding-bottom="0.134cm" fo:padding-left="0.259cm" fo:padding-right="0.259cm" loext:decorative="false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97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609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0.987cm" loext:decorative="false"/>
      <style:paragraph-properties style:writing-mode="lr-tb"/>
    </style:style>
    <style:style style:name="gr86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1.955cm" fo:padding-top="0.151cm" fo:padding-bottom="0.151cm" fo:padding-left="0.276cm" fo:padding-right="0.276cm" loext:decorative="false"/>
    </style:style>
    <style:style style:name="gr87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37cm" fo:min-width="2.779cm" fo:padding-top="0.151cm" fo:padding-bottom="0.151cm" fo:padding-left="0.276cm" fo:padding-right="0.276cm" loext:decorative="false"/>
    </style:style>
    <style:style style:name="gr88" style:family="graphic" style:parent-style-name="Object_20_with_20_no_20_fill_20_and_20_no_20_line">
      <style:graphic-properties draw:stroke="solid" svg:stroke-color="#69696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justify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2a6099"/>
      <style:paragraph-properties fo:margin-left="0cm" fo:margin-right="0cm" fo:margin-top="0cm" fo:margin-bottom="0cm" fo:line-height="100%" fo:text-align="justify" fo:text-indent="0cm"/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solid" draw:fill-color="#404040"/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="none" draw:fill-color="#ffffff"/>
    </style:style>
    <style:style style:name="T1" style:family="text">
      <style:text-properties fo:color="#000000" loext:opacity="100%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2" style:family="text">
      <style:text-properties fo:color="#000000" loext:opacity="100%" style:font-name="Liberation Sans1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fo:font-weight="bold" style:font-size-asian="15pt" style:font-size-complex="15pt"/>
    </style:style>
    <style:style style:name="T7" style:family="text">
      <style:text-properties fo:font-weight="bold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4.40000009536743pt" fo:font-weight="normal" style:font-size-asian="4.40000009536743pt" style:font-weight-asian="normal" style:font-size-complex="4.40000009536743pt" style:font-weight-complex="normal"/>
    </style:style>
    <style:style style:name="T1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8.75cm" svg:height="0.75cm" svg:x="1.125cm" svg:y="3.05cm">
          <draw:text-box>
            <text:p text:style-name="P1"><text:span text:style-name="T1">Desenvolvido por: </text:span><text:span text:style-name="T2">Daniel Borges – Analista de Sistemas, Assistente Administrativo Educacional</text:span></text:p>
          </draw:text-box>
        </draw:frame>
        <draw:frame draw:style-name="gr2" draw:text-style-name="P2" draw:layer="layout" svg:width="18.75cm" svg:height="11.837cm" svg:x="1.125cm" svg:y="5.651cm">
          <draw:text-box>
            <text:p text:style-name="P1"><text:span text:style-name="T3"><text:tab/></text:span><text:span text:style-name="T3">O que esta extensão pode fazer no SGE?</text:span></text:p>
            <text:p text:style-name="P1"><text:span text:style-name="T4"/></text:p>
            <text:p text:style-name="P1"><text:span text:style-name="T5">Os programas contidos nesta extensão permitem incrementar a forma como o SGE apresenta suas funções, como a mudança de cores para facilitar a visualização dos dados, a possibilidade de preencher formulários de forma automática, emissão de novos relatórios, navegação facilitada ente módulos, entre outros, poupando o tempo antes gasto nessas tarefas.</text:span></text:p>
            <text:p text:style-name="P1"><text:span text:style-name="T5"/></text:p>
            <text:p text:style-name="P1"><text:span text:style-name="T4"/></text:p>
            <text:p text:style-name="P1"><text:span text:style-name="T3"><text:tab/></text:span><text:span text:style-name="T3">Preciso instalar algum programa para que elas funcionem?</text:span></text:p>
            <text:p text:style-name="P1"><text:span text:style-name="T4"/></text:p>
            <text:p text:style-name="P1"><text:span text:style-name="T5">Não é necessário baixar ou instalar nenhum aplicativo ou programa para que uma extensão funcione, apenas adicionar a mesma através da biblioteca do navegador.</text:span></text:p>
            <text:p text:style-name="P1"><text:span text:style-name="T5"/></text:p>
            <text:p text:style-name="P1"><text:span text:style-name="T4"/></text:p>
            <text:p text:style-name="P1"><text:span text:style-name="T3"><text:tab/></text:span><text:span text:style-name="T3">Por que utilizar extensões?</text:span></text:p>
            <text:p text:style-name="P1"><text:span text:style-name="T4"/></text:p>
            <text:p text:style-name="P1"><text:span text:style-name="T5">Extensões para navegadores de internet não alteram nem modificam o programa original, apenas acrescentam novas funcionalidades utilizando os recursos já disponíveis. Isso facilita seu acesso e manutenção, uma vez que o código original do sistema permanece o mesmo.</text:span></text:p>
          </draw:text-box>
        </draw:frame>
        <draw:frame draw:style-name="gr3" draw:text-style-name="P4" draw:layer="layout" svg:width="7.25cm" svg:height="1cm" svg:x="6.875cm" svg:y="4.35cm">
          <draw:text-box>
            <text:p text:style-name="P3"><text:span text:style-name="T6">Introdução</text:span></text:p>
          </draw:text-box>
        </draw:frame>
        <draw:frame draw:style-name="gr4" draw:text-style-name="P5" draw:layer="layout" svg:width="0.502cm" svg:height="1.187cm" svg:x="12cm" svg:y="9.35cm">
          <draw:text-box>
            <text:p/>
          </draw:text-box>
        </draw:frame>
        <draw:frame draw:style-name="gr5" draw:text-style-name="P6" draw:layer="layout" svg:width="1.145cm" svg:height="1.145cm" svg:x="1.283cm" svg:y="5.353cm">
          <draw:image xlink:href="Pictures/1000000000000064000000647CED8046.jpg" xlink:type="simple" xlink:show="embed" xlink:actuate="onLoad" draw:mime-type="image/jpeg">
            <text:p/>
          </draw:image>
        </draw:frame>
        <draw:frame draw:style-name="gr5" draw:text-style-name="P6" draw:layer="layout" svg:width="1.104cm" svg:height="1cm" svg:x="1.303cm" svg:y="10.025cm">
          <draw:image xlink:href="Pictures/100000000000006400000064B778BDCA.jpg" xlink:type="simple" xlink:show="embed" xlink:actuate="onLoad" draw:mime-type="image/jpeg">
            <text:p/>
          </draw:image>
        </draw:frame>
        <draw:frame draw:style-name="gr5" draw:text-style-name="P6" draw:layer="layout" svg:width="1cm" svg:height="0.895cm" svg:x="1.355cm" svg:y="13.096cm">
          <draw:image xlink:href="Pictures/100000000000006400000064061EA5CF.jpg" xlink:type="simple" xlink:show="embed" xlink:actuate="onLoad" draw:mime-type="image/jpeg">
            <text:p/>
          </draw:image>
        </draw:frame>
        <draw:g draw:style-name="gr6">
          <draw:frame draw:style-name="gr7" draw:text-style-name="P7" draw:layer="layout" svg:width="7.25cm" svg:height="1cm" svg:x="7.757cm" svg:y="1.426cm">
            <draw:text-box>
              <text:p text:style-name="P3"><text:span text:style-name="T7">Extensão para o SGE</text:span></text:p>
            </draw:text-box>
          </draw:frame>
          <draw:frame draw:style-name="gr5" draw:text-style-name="P6" draw:layer="layout" svg:width="1.648cm" svg:height="1.648cm" svg:x="5.994cm" svg:y="1.102cm">
            <draw:image xlink:href="Pictures/10000001000000800000008062D06EFE.png" xlink:type="simple" xlink:show="embed" xlink:actuate="onLoad" draw:mime-type="image/png">
              <text:p/>
            </draw:image>
          </draw:frame>
        </draw:g>
        <draw:frame draw:style-name="gr8" draw:text-style-name="P4" draw:layer="layout" svg:width="7.25cm" svg:height="1cm" svg:x="6.875cm" svg:y="16.85cm">
          <draw:text-box>
            <text:p text:style-name="P3"><text:span text:style-name="T6">Atualizações</text:span></text:p>
          </draw:text-box>
        </draw:frame>
        <draw:frame draw:style-name="gr9" draw:text-style-name="P8" draw:layer="layout" svg:width="18.75cm" svg:height="1.275cm" svg:x="1.125cm" svg:y="17.852cm">
          <draw:text-box>
            <text:p text:style-name="P1"><text:span text:style-name="T8">Quando houver atualização para a extensão, esta será instalada automaticamente. Não é necessário adicionar ou configurar novamente.</text:span></text:p>
          </draw:text-box>
        </draw:frame>
        <draw:frame draw:style-name="gr10" draw:text-style-name="P4" draw:layer="layout" svg:width="7.25cm" svg:height="1cm" svg:x="6.875cm" svg:y="19.45cm">
          <draw:text-box>
            <text:p text:style-name="P3"><text:span text:style-name="T6">Erros</text:span></text:p>
          </draw:text-box>
        </draw:frame>
        <draw:frame draw:style-name="gr11" draw:text-style-name="P11" draw:layer="layout" svg:width="18.75cm" svg:height="8.025cm" svg:x="1.125cm" svg:y="20.253cm">
          <draw:text-box>
            <text:p text:style-name="P1"><text:span text:style-name="T9">Atenção</text:span><text:span text:style-name="T10">: esta extensão pode não funcionar se utilizada fora da intranet ou em dispositivo que execute conexão por acesso remoto. Em caso de falhas, recarregue a página do módulo e tente novamente. </text:span></text:p>
            <text:p text:style-name="P9"><text:span text:style-name="T10">Caso o programa apresente erros sistemáticos, remover e adicionar novamente a a extensão na biblioteca do navegador pode solucionar o problema.</text:span></text:p>
            <text:p text:style-name="P1"><text:span text:style-name="T10"/></text:p>
            <text:p text:style-name="P1"><text:span text:style-name="T10">Como todo programa computacional, esta extensão passa por manutenção constantemente. Por favor, fique à vontade para contatar o desenvolvedor para apresentar sugestões e reclamações. </text:span><text:span text:style-name="T9">Seu feedback é muito importante para o aperfeiçoamento!</text:span></text:p>
            <text:p text:style-name="P1"><text:span text:style-name="T9"/></text:p>
            <text:p text:style-name="P1"><text:span text:style-name="T10"/></text:p>
            <text:p text:style-name="P10"><text:span text:style-name="T3"><text:a xlink:href="https://forms.gle/RFphjRA6MUVdhvL69" xlink:type="simple">Clique aqui para preencher o formulário de sugestões</text:a></text:span><text:span text:style-name="T8">. </text:span></text:p>
            <text:p text:style-name="P10"><text:span text:style-name="T8"/></text:p>
            <text:p text:style-name="P10"><text:span text:style-name="T8">Ou encaminhe e-mail para:</text:span></text:p>
            <text:p text:style-name="P10"><text:span text:style-name="T8"/></text:p>
            <text:p text:style-name="P10"><text:span text:style-name="T3"><text:a xlink:href="mailto:danielbgpteclas@gmail.com" xlink:type="simple">danielbgpteclas@gmail.com</text:a></text:span><text:span text:style-name="T8">.</text:span></text:p>
          </draw:text-box>
        </draw:frame>
      </draw:page>
      <draw:page draw:name="page2" draw:style-name="dp1" draw:master-page-name="Padrão">
        <draw:frame draw:style-name="gr12" draw:text-style-name="P4" draw:layer="layout" svg:width="7.25cm" svg:height="1cm" svg:x="6.875cm" svg:y="1.15cm">
          <draw:text-box>
            <text:p text:style-name="P3"><text:span text:style-name="T6">Versão</text:span></text:p>
          </draw:text-box>
        </draw:frame>
        <draw:frame draw:style-name="gr13" draw:text-style-name="P12" draw:layer="layout" svg:width="18.75cm" svg:height="22.229cm" svg:x="1.125cm" svg:y="2.352cm">
          <draw:text-box>
            <text:p text:style-name="P1"><text:span text:style-name="T3">Versão 1.7.1 – 11/11/2025</text:span></text:p>
            <text:p text:style-name="P1"><text:span text:style-name="T3"/></text:p>
            <text:p text:style-name="P1"><text:span text:style-name="T3">Funcionalidades</text:span></text:p>
            <text:p text:style-name="P1"><text:span text:style-name="T4"/></text:p>
            <text:p text:style-name="P1"><text:span text:style-name="T5">Emissão de relatório de faltas com justificativas por aluno (Módulo de Frequência &gt; Cadastro de Justificativa de Faltas.</text:span></text:p>
            <text:p text:style-name="P1"><text:span text:style-name="T5"/></text:p>
            <text:p text:style-name="P1"><text:span text:style-name="T5">Layout melhorado e navegação entre turmas na tela de registro de faltas (Módulo de Frequência &gt; Registro Diário de Faltas).</text:span></text:p>
            <text:p text:style-name="P1"><text:span text:style-name="T5"/></text:p>
            <text:p text:style-name="P1"><text:span text:style-name="T5">Emissão de listagem de apuração de frequência com datas, tarjas, anulação automática das linhas de estudantes afastados e campo de somatório de faltas (Módulo de Formulários de Escrituração &gt; Listagem de Apuração de Frequência).</text:span></text:p>
            <text:p text:style-name="P1"><text:span text:style-name="T5"/></text:p>
            <text:p text:style-name="P1"><text:span text:style-name="T5">Emissão de fichas de avaliação por aluno com preenchimento automático de acordo com a situação do mesmo (Módulo de Boletim &gt; Cadastro e Relatórios do Boletim Escolar &gt; Relatórios &gt; Boletim).</text:span></text:p>
            <text:p text:style-name="P1"><text:span text:style-name="T5"><text:line-break/></text:span><text:span text:style-name="T5">Navegação da trajetória para gestão de alunos a partir da trajetória de movimentações (Módulo Movimentação &gt; Trajetória de Movimentações).</text:span></text:p>
            <text:p text:style-name="P1"><text:span text:style-name="T5"/></text:p>
            <text:p text:style-name="P1"><text:span text:style-name="T5">Atalhos para módulos mais utilizados a partir da tela de gestão de alunos (Menu Principal &gt; Módulo Gestão de Alunos)</text:span></text:p>
            <text:p text:style-name="P1"><text:span text:style-name="T5"/></text:p>
            <text:p text:style-name="P1"><text:span text:style-name="T5">Pesquisa pelos dados dos responsáveis com navegação para a trajetória de movimentações (Módulo movimentação &gt; Localizar por Responsável).</text:span><text:span text:style-name="T5"><text:line-break/></text:span><text:span text:style-name="T5"><text:line-break/></text:span><text:span text:style-name="T5">Emissão de relatórios de controle para apoio de registro do trabalho pedagógico (Módulo de Formulários de Escrituração &gt; Formulários Por Turma)</text:span></text:p>
            <text:p text:style-name="P1"><text:span text:style-name="T5"/></text:p>
            <text:p text:style-name="P1"><text:span text:style-name="T3">Notas da versão</text:span></text:p>
            <text:p text:style-name="P1"><text:span text:style-name="T3"/></text:p>
            <text:p text:style-name="P1"><text:span text:style-name="T8">- Inclusão do formato de listagem de apuração de frequência do tipo Integral (dois turnos por dia letivo)</text:span></text:p>
            <text:p text:style-name="P1"><text:span text:style-name="T8"/></text:p>
            <text:p text:style-name="P1"><text:span text:style-name="T8">- Nova opção de navegação por lista no registro diário de faltas</text:span></text:p>
            <text:p text:style-name="P1"><text:span text:style-name="T8"/></text:p>
            <text:p text:style-name="P1"><text:span text:style-name="T8">- Formatação do consolidado mensal por turma para facilitar a visualização de estudantes transferidos ou remanejados</text:span></text:p>
            <text:p text:style-name="P1"><text:span text:style-name="T8"/></text:p>
            <text:p text:style-name="P1"><text:span text:style-name="T8">- Mensagem de aviso durante o processo de afastamento de alunos que possuem tempo ampliado cadastrado</text:span></text:p>
          </draw:text-box>
        </draw:frame>
      </draw:page>
      <draw:page draw:name="page3" draw:style-name="dp1" draw:master-page-name="Padrão">
        <draw:frame draw:style-name="gr14" draw:text-style-name="P4" draw:layer="layout" svg:width="10.375cm" svg:height="0.85cm" svg:x="5.313cm" svg:y="1.15cm">
          <draw:text-box>
            <text:p text:style-name="P3"><text:span text:style-name="T6">Demonstração das Funcionalidades</text:span></text:p>
          </draw:text-box>
        </draw:frame>
        <draw:frame draw:style-name="gr15" draw:text-style-name="P2" draw:layer="layout" svg:width="18.75cm" svg:height="4.259cm" svg:x="1.125cm" svg:y="2.152cm">
          <draw:text-box>
            <text:p text:style-name="P1"><text:span text:style-name="T3">Relatório de Faltas</text:span></text:p>
          </draw:text-box>
        </draw:frame>
        <draw:frame draw:style-name="gr16" draw:text-style-name="P11" draw:layer="layout" svg:width="18.75cm" svg:height="1.275cm" svg:x="1.125cm" svg:y="2.897cm">
          <draw:text-box>
            <text:p text:style-name="P1"><text:span text:style-name="T8">Após acessar a tela de cadastro de justificativa de faltas de um estudante, uma nova opção constará na parte inferior da página. Basta clicar sobre ela para gerar o relatório.</text:span></text:p>
          </draw:text-box>
        </draw:frame>
        <draw:frame draw:style-name="gr5" draw:text-style-name="P6" draw:layer="layout" svg:width="12.229cm" svg:height="8.545cm" svg:x="1.271cm" svg:y="4.455cm">
          <draw:image xlink:href="Pictures/1000000100000252000001762BB8AB88.png" xlink:type="simple" xlink:show="embed" xlink:actuate="onLoad" draw:mime-type="image/png">
            <text:p/>
          </draw:image>
        </draw:frame>
        <draw:custom-shape draw:style-name="gr17" draw:text-style-name="P13" draw:layer="layout" svg:width="2.035cm" svg:height="0.439cm" svg:x="1.216cm" svg:y="11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6.435cm" svg:height="8.574cm" svg:x="13.5cm" svg:y="4.526cm">
          <draw:image xlink:href="Pictures/100000010000025700000333561B8288.png" xlink:type="simple" xlink:show="embed" xlink:actuate="onLoad" draw:mime-type="image/png">
            <text:p/>
          </draw:image>
        </draw:frame>
        <draw:frame draw:style-name="gr19" draw:text-style-name="P2" draw:layer="layout" svg:width="18.75cm" svg:height="1.348cm" svg:x="1.125cm" svg:y="13.252cm">
          <draw:text-box>
            <text:p text:style-name="P1"><text:span text:style-name="T3">Registro diário de faltas</text:span></text:p>
          </draw:text-box>
        </draw:frame>
        <draw:frame draw:style-name="gr20" draw:text-style-name="P11" draw:layer="layout" svg:width="18.75cm" svg:height="2.299cm" svg:x="1.125cm" svg:y="14.161cm">
          <draw:text-box>
            <text:p text:style-name="P1"><text:span text:style-name="T8">Quando a tela de registro diário de faltas for acessada, haverá alteração do layout para visualizar as faltas e destaque da linha do estudante durante a sobreposição do mouse. É possível navegar entre as turmas utilizando o menu suspenso por turma ou os botões de navegação.</text:span></text:p>
          </draw:text-box>
        </draw:frame>
        <draw:frame draw:style-name="gr21" draw:text-style-name="P14" draw:layer="layout" svg:width="12.892cm" svg:height="11.845cm" svg:x="1.254cm" svg:y="16.855cm">
          <draw:image xlink:href="Pictures/10000001000002CA000002904D94B8EA.png" xlink:type="simple" xlink:show="embed" xlink:actuate="onLoad" draw:mime-type="image/png">
            <text:p/>
          </draw:image>
        </draw:frame>
        <draw:custom-shape draw:style-name="gr22" draw:text-style-name="P13" draw:layer="layout" svg:width="2.8cm" svg:height="0.439cm" svg:x="1.408cm" svg:y="19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5.642cm" svg:height="0.439cm" svg:x="1.408cm" svg:y="20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4" draw:layer="layout" svg:width="5.499cm" svg:height="5.5cm" svg:x="14.3cm" svg:y="18.198cm">
          <draw:image xlink:href="Pictures/1000000100000196000001315DFD2190.png" xlink:type="simple" xlink:show="embed" xlink:actuate="onLoad" draw:mime-type="image/png">
            <text:p/>
          </draw:image>
        </draw:frame>
        <draw:custom-shape draw:style-name="gr22" draw:text-style-name="P13" draw:layer="layout" svg:width="2.8cm" svg:height="0.439cm" svg:x="14.408cm" svg:y="19.25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frame draw:style-name="gr25" draw:text-style-name="P6" draw:layer="layout" svg:width="14.563cm" svg:height="5.493cm" svg:x="3.25cm" svg:y="13.507cm">
          <draw:image xlink:href="Pictures/10000001000002D400000110187BA85E.png" xlink:type="simple" xlink:show="embed" xlink:actuate="onLoad" draw:mime-type="image/png">
            <text:p/>
          </draw:image>
        </draw:frame>
        <draw:frame draw:style-name="gr26" draw:text-style-name="P2" draw:layer="layout" svg:width="18.75cm" svg:height="4.259cm" svg:x="1.125cm" svg:y="2.152cm">
          <draw:text-box>
            <text:p text:style-name="P1"><text:span text:style-name="T3">Listagem de apuração de frequência</text:span></text:p>
          </draw:text-box>
        </draw:frame>
        <draw:frame draw:style-name="gr27" draw:text-style-name="P11" draw:layer="layout" svg:width="18.75cm" svg:height="1.275cm" svg:x="1.125cm" svg:y="2.897cm">
          <draw:text-box>
            <text:p text:style-name="P1"><text:span text:style-name="T8">Na página de listagem de apuração de frequência, após filtrar as turmas, use o botão “Preparar Relatório” para exibir o menu.</text:span></text:p>
          </draw:text-box>
        </draw:frame>
        <draw:frame draw:style-name="gr5" draw:text-style-name="P6" draw:layer="layout" svg:width="12.689cm" svg:height="7cm" svg:x="4.156cm" svg:y="4.4cm">
          <draw:image xlink:href="Pictures/10000001000002CC0000018B201B86CE.png" xlink:type="simple" xlink:show="embed" xlink:actuate="onLoad" draw:mime-type="image/png">
            <text:p/>
          </draw:image>
        </draw:frame>
        <draw:custom-shape draw:style-name="gr28" draw:text-style-name="P13" draw:layer="layout" svg:width="2.562cm" svg:height="0.439cm" svg:x="7.336cm" svg:y="9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1" draw:layer="layout" svg:width="18.75cm" svg:height="1.275cm" svg:x="1.125cm" svg:y="11.798cm">
          <draw:text-box>
            <text:p text:style-name="P1"><text:span text:style-name="T8">No novo menu “Cabeçalho”, selecione ‘Tipo” de frequência de turma (Diário ou Módulo),</text:span></text:p>
            <text:p text:style-name="P1"><text:span text:style-name="T8">o Mês e clique no botão ‘adicionar’ <text:s text:c="6"/>. Faça o mesmo para os dias.</text:span></text:p>
          </draw:text-box>
        </draw:frame>
        <draw:custom-shape draw:style-name="gr30" draw:text-style-name="P13" draw:layer="layout" svg:width="2.757cm" svg:height="0.439cm" svg:x="5.327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draw:layer="layout" svg:width="1.833cm" svg:height="0.344cm" svg:x="8.485cm" svg:y="1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5.888cm" svg:height="0.359cm" svg:x="6.136cm" svg:y="16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1.986cm" svg:height="0.439cm" svg:x="8.141cm" svg:y="14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1" draw:layer="layout" svg:width="18.75cm" svg:height="3.323cm" svg:x="1.125cm" svg:y="19.299cm">
          <draw:text-box>
            <text:p text:style-name="P1"><text:span text:style-name="T8">Se desejar adicionar uma tarja para algum dia, use o botão “Adicionar legenda” <text:s text:c="7"/>e</text:span></text:p>
            <text:p text:style-name="P1"><text:span text:style-name="T8">selecione a opção deseja no menu suspenso que será exibido.</text:span></text:p>
            <text:p text:style-name="P9"><text:span text:style-name="T8">Caso seja necessário excluir todas as informações inseridas no cabeçalho, use o botão “Limpar”.</text:span></text:p>
            <text:p text:style-name="P9"><text:span text:style-name="T8">Se desejar adicionar uma coluna para o registro do somatório de faltas, basta selecionar tal opção.</text:span></text:p>
          </draw:text-box>
        </draw:frame>
        <draw:frame draw:style-name="gr5" draw:text-style-name="P6" draw:layer="layout" svg:width="0.5cm" svg:height="0.5cm" svg:x="17.708cm" svg:y="19.438cm">
          <draw:image xlink:href="Pictures/1000000100000056000000564E919336.png" xlink:type="simple" xlink:show="embed" xlink:actuate="onLoad" draw:mime-type="image/png">
            <text:p/>
          </draw:image>
        </draw:frame>
        <draw:frame draw:style-name="gr5" draw:text-style-name="P6" draw:layer="layout" svg:width="0.696cm" svg:height="0.595cm" svg:x="8.56cm" svg:y="12.435cm">
          <draw:image xlink:href="Pictures/100000010000004C0000004168BE4A04.png" xlink:type="simple" xlink:show="embed" xlink:actuate="onLoad" draw:mime-type="image/png">
            <text:p/>
          </draw:image>
        </draw:frame>
        <draw:custom-shape draw:style-name="gr35" draw:text-style-name="P15" draw:layer="layout" svg:width="2cm" svg:height="0.25cm" svg:x="9.322cm" svg:y="15.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.412cm" svg:height="0.25cm" svg:x="5.362cm" svg:y="15.34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0.375cm" svg:height="0.85cm" svg:x="5.314cm" svg:y="1.15cm">
          <draw:text-box>
            <text:p text:style-name="P3"><text:span text:style-name="T6">Demonstração das Funcionalidades</text:span></text:p>
          </draw:text-box>
        </draw:frame>
        <draw:custom-shape draw:style-name="gr36" draw:text-style-name="P15" draw:layer="layout" svg:width="3.412cm" svg:height="0.25cm" svg:x="7.614cm" svg:y="15.136cm">
          <text:p/>
          <draw:enhanced-geometry svg:viewBox="0 0 21600 21600" draw:type="rectangle" draw:enhanced-path="M 0 0 L 21600 0 21600 21600 0 21600 0 0 Z N"/>
        </draw:custom-shape>
        <draw:g draw:style-name="gr38">
          <draw:frame draw:style-name="gr5" draw:text-style-name="P6" draw:layer="layout" svg:width="14.427cm" svg:height="5.9cm" svg:x="3.287cm" svg:y="22.878cm">
            <draw:image xlink:href="Pictures/10000001000002AC000001042639F9AE.png" xlink:type="simple" xlink:show="embed" xlink:actuate="onLoad" draw:mime-type="image/png">
              <text:p/>
            </draw:image>
          </draw:frame>
          <draw:custom-shape draw:style-name="gr39" draw:text-style-name="P13" draw:layer="layout" svg:width="0.466cm" svg:height="0.437cm" svg:x="7.603cm" svg:y="26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5" draw:layer="layout" svg:width="2.487cm" svg:height="0.294cm" svg:x="10.743cm" svg:y="24.52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4.219cm" svg:height="0.294cm" svg:x="5.489cm" svg:y="24.8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3.171cm" svg:height="0.294cm" svg:x="7.875cm" svg:y="24.61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1.02cm" svg:height="0.422cm" svg:x="10.56cm" svg:y="23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2.11cm" svg:height="0.422cm" svg:x="11.761cm" svg:y="23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13" draw:layer="layout" svg:width="2.023cm" svg:height="0.439cm" svg:x="3.25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adrão">
        <draw:frame draw:style-name="gr46" draw:text-style-name="P11" draw:layer="layout" svg:width="18.75cm" svg:height="12.027cm" svg:x="1.125cm" svg:y="2.497cm">
          <draw:text-box>
            <text:p text:style-name="P1"><text:span text:style-name="T8">Para anular as linhas dos alunos que já foram afastados da escola, basta selecionar a opção “Riscar alunos afastados”. </text:span></text:p>
            <text:p text:style-name="P1"><text:span text:style-name="T8">Aguarde o carregamento dos dados e a liberação do botão de finalização e, após o preenchimento, para emitir a lista basta clicar em “Gerar Relatório Com Datas”.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11"/></text:p>
            <text:p text:style-name="P1"><text:span text:style-name="T8">Caso deseje emitir a listagem original, use o botão ‘Gerar Relatório Sem Datas’ no menu ‘Localizar Turma’. </text:span></text:p>
            <text:p text:style-name="P1"><text:span text:style-name="T8">Sempre confira os formulários antes de utilizá-los nos processos de escrituração escolar.</text:span></text:p>
          </draw:text-box>
        </draw:frame>
        <draw:frame draw:style-name="gr47" draw:text-style-name="P2" draw:layer="layout" svg:width="18.75cm" svg:height="0.947cm" svg:x="1.125cm" svg:y="15.053cm">
          <draw:text-box>
            <text:p text:style-name="P1"><text:span text:style-name="T3">Fichas de Avaliação</text:span></text:p>
          </draw:text-box>
        </draw:frame>
        <draw:frame draw:style-name="gr48" draw:text-style-name="P11" draw:layer="layout" svg:width="18.75cm" svg:height="1.787cm" svg:x="1.125cm" svg:y="16.198cm">
          <draw:text-box>
            <text:p text:style-name="P1"><text:span text:style-name="T8">Para emitir a ficha de avaliação, no módulo de boletins, selecione a opção de relatórios e preencha os filtros da turma desejada. Quando os alunos forem listados basta selecionar o novo botão “Ficha de Avaliação” na coluna “Opções”.</text:span></text:p>
          </draw:text-box>
        </draw:frame>
        <draw:frame draw:style-name="gr49" draw:text-style-name="P11" draw:layer="layout" svg:width="18.75cm" svg:height="2.811cm" svg:x="1.125cm" svg:y="25.499cm">
          <draw:text-box>
            <text:p text:style-name="P1"><text:span text:style-name="T8">No primeiro acesso a esta funcionalidade, será aberta uma página para que o usuário preencha os dados do cabeçalho referentes às informações da escola (Nome, Endereço, Situação Escolar, etc).</text:span></text:p>
            <text:p text:style-name="P1"><text:span text:style-name="T8">As informações ficarão salvas para uso posterior, e serão automaticamente passadas aos formulários.</text:span></text:p>
          </draw:text-box>
        </draw:frame>
        <draw:frame draw:style-name="gr50" draw:text-style-name="P4" draw:layer="layout" svg:width="10.375cm" svg:height="0.85cm" svg:x="5.314cm" svg:y="1.15cm">
          <draw:text-box>
            <text:p text:style-name="P3"><text:span text:style-name="T6">Demonstração das Funcionalidades</text:span></text:p>
          </draw:text-box>
        </draw:frame>
        <draw:g draw:style-name="gr38">
          <draw:frame draw:style-name="gr5" draw:text-style-name="P6" draw:layer="layout" svg:width="17.613cm" svg:height="6.804cm" svg:x="1.5cm" svg:y="5.2cm">
            <draw:image xlink:href="Pictures/100000010000028B000000F3AA0BB012.png" xlink:type="simple" xlink:show="embed" xlink:actuate="onLoad" draw:mime-type="image/png">
              <text:p/>
            </draw:image>
          </draw:frame>
          <draw:custom-shape draw:style-name="gr51" draw:text-style-name="P15" draw:layer="layout" svg:width="4.698cm" svg:height="0.372cm" svg:x="7.342cm" svg:y="7.23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5" draw:layer="layout" svg:width="3.945cm" svg:height="0.371cm" svg:x="4.316cm" svg:y="7.612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3" draw:layer="layout" svg:width="3.729cm" svg:height="0.553cm" svg:x="15.248cm" svg:y="5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3" draw:layer="layout" svg:width="4.913cm" svg:height="0.523cm" svg:x="12.069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8.249cm" svg:height="6.731cm" svg:x="1.251cm" svg:y="18.15cm">
          <draw:image xlink:href="Pictures/10000001000003C8000001578E2A5A40.png" xlink:type="simple" xlink:show="embed" xlink:actuate="onLoad" draw:mime-type="image/png">
            <text:p/>
          </draw:image>
        </draw:frame>
        <draw:custom-shape draw:style-name="gr55" draw:text-style-name="P13" draw:layer="layout" svg:width="0.507cm" svg:height="0.513cm" svg:x="18.372cm" svg:y="2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3" draw:layer="layout" svg:width="0.507cm" svg:height="0.513cm" svg:x="18.372cm" svg:y="23.83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adrão">
        <draw:frame draw:style-name="gr56" draw:text-style-name="P2" draw:layer="layout" svg:width="18.75cm" svg:height="0.947cm" svg:x="1.125cm" svg:y="2.553cm">
          <draw:text-box>
            <text:p text:style-name="P1"><text:span text:style-name="T3">Dados do cabeçalho de relatórios</text:span></text:p>
          </draw:text-box>
        </draw:frame>
        <draw:frame draw:style-name="gr57" draw:text-style-name="P11" draw:layer="layout" svg:width="18.75cm" svg:height="1.275cm" svg:x="1.125cm" svg:y="3.498cm">
          <draw:text-box>
            <text:p text:style-name="P1"><text:span text:style-name="T8">Caso deseje atualizar as informações inseridas nos cabeçalhos dos formulários e relatórios, basta clicar no botão da extensão disponível no menu do navegador.</text:span></text:p>
          </draw:text-box>
        </draw:frame>
        <draw:frame draw:style-name="gr5" draw:text-style-name="P6" draw:layer="layout" svg:width="9.75cm" svg:height="8cm" svg:x="1.25cm" svg:y="5.3cm">
          <draw:image xlink:href="Pictures/10000001000001A50000013242CE3D32.png" xlink:type="simple" xlink:show="embed" xlink:actuate="onLoad" draw:mime-type="image/png">
            <text:p/>
          </draw:image>
        </draw:frame>
        <draw:custom-shape draw:style-name="gr58" draw:text-style-name="P16" draw:layer="layout" svg:width="0.793cm" svg:height="0.754cm" svg:x="9.265cm" svg:y="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3" draw:layer="layout" svg:width="6.707cm" svg:height="0.814cm" svg:x="1.779cm" svg:y="10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3" draw:layer="layout" svg:width="0.904cm" svg:height="0.953cm" svg:x="7.97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7.386cm" svg:height="8.05cm" svg:x="12.114cm" svg:y="5.3cm">
          <draw:image xlink:href="Pictures/10000001000000F80000011E9251030F.png" xlink:type="simple" xlink:show="embed" xlink:actuate="onLoad" draw:mime-type="image/png">
            <text:p/>
          </draw:image>
        </draw:frame>
        <draw:custom-shape draw:style-name="gr61" draw:text-style-name="P16" draw:layer="layout" svg:width="0.959cm" svg:height="0.763cm" svg:x="17.376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3" draw:layer="layout" svg:width="2.837cm" svg:height="1.247cm" svg:x="12.605cm" svg:y="1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6" draw:layer="layout" svg:width="8.501cm" svg:height="12.276cm" svg:x="11.2cm" svg:y="15.1cm">
          <draw:image xlink:href="Pictures/10000001000001B900000277AC4E1E40.png" xlink:type="simple" xlink:show="embed" xlink:actuate="onLoad" draw:mime-type="image/png">
            <text:p/>
          </draw:image>
        </draw:frame>
        <draw:frame draw:style-name="gr64" draw:text-style-name="P17" draw:layer="layout" svg:width="8.625cm" svg:height="4.25cm" svg:x="1.825cm" svg:y="18.85cm">
          <draw:text-box>
            <text:p text:style-name="P1"><text:span text:style-name="T12">Atenção: sempre confira os lançamentos na ficha de avaliação.</text:span></text:p>
            <text:p text:style-name="P1"><text:span text:style-name="T12">Assim como o boletim escolar, se as notas e demais informações não forem lançadas de forma completa no sistema, não será possível emitir as fichas de avaliação.</text:span></text:p>
          </draw:text-box>
        </draw:frame>
        <draw:frame draw:style-name="gr65" draw:text-style-name="P4" draw:layer="layout" svg:width="10.375cm" svg:height="0.85cm" svg:x="5.314cm" svg:y="1.15cm">
          <draw:text-box>
            <text:p text:style-name="P3"><text:span text:style-name="T6">Demonstração das Funcionalidades</text:span></text:p>
          </draw:text-box>
        </draw:frame>
      </draw:page>
      <draw:page draw:name="page7" draw:style-name="dp1" draw:master-page-name="Padrão">
        <draw:frame draw:style-name="gr66" draw:text-style-name="P2" draw:layer="layout" svg:width="18.75cm" svg:height="0.947cm" svg:x="1.125cm" svg:y="2.254cm">
          <draw:text-box>
            <text:p text:style-name="P1"><text:span text:style-name="T3">Navegação entre Trajetória e Gestão de Alunos e Opções de atalho</text:span></text:p>
          </draw:text-box>
        </draw:frame>
        <draw:frame draw:style-name="gr67" draw:text-style-name="P11" draw:layer="layout" svg:width="18.75cm" svg:height="1.275cm" svg:x="1.125cm" svg:y="3.099cm">
          <draw:text-box>
            <text:p text:style-name="P1"><text:span text:style-name="T8">Após a trajetória do estudante ser exibida na tela, o nome do aluno se torna um link que permite navegar para o módulo de Gestão de Alunos, bastando clicar sobre o mesmo.</text:span></text:p>
          </draw:text-box>
        </draw:frame>
        <draw:frame draw:style-name="gr5" draw:text-style-name="P6" draw:layer="layout" svg:width="18.749cm" svg:height="5.009cm" svg:x="1.151cm" svg:y="4.75cm">
          <draw:image xlink:href="Pictures/1000000100000355000000E1F89E6C5E.png" xlink:type="simple" xlink:show="embed" xlink:actuate="onLoad" draw:mime-type="image/png">
            <text:p/>
          </draw:image>
        </draw:frame>
        <draw:custom-shape draw:style-name="gr68" draw:text-style-name="P13" draw:layer="layout" svg:width="2.781cm" svg:height="0.439cm" svg:x="3.925cm" svg:y="6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11" draw:layer="layout" svg:width="18.75cm" svg:height="1.275cm" svg:x="1.125cm" svg:y="10.2cm">
          <draw:text-box>
            <text:p text:style-name="P1"><text:span text:style-name="T8">Dessa forma já será exibida a pesquisa para o estudante, sem a necessidade de retornar aos menus e preencher os formulários com os mesmos dados:</text:span></text:p>
          </draw:text-box>
        </draw:frame>
        <draw:frame draw:style-name="gr70" draw:text-style-name="P4" draw:layer="layout" svg:width="10.375cm" svg:height="0.85cm" svg:x="5.314cm" svg:y="1.15cm">
          <draw:text-box>
            <text:p text:style-name="P3"><text:span text:style-name="T6">Demonstração das Funcionalidades</text:span></text:p>
          </draw:text-box>
        </draw:frame>
        <draw:frame draw:style-name="gr5" draw:text-style-name="P6" draw:layer="layout" svg:width="18.599cm" svg:height="9.898cm" svg:x="1.201cm" svg:y="11.85cm">
          <draw:image xlink:href="Pictures/10000001000004D60000028543279E27.png" xlink:type="simple" xlink:show="embed" xlink:actuate="onLoad" draw:mime-type="image/png">
            <text:p/>
          </draw:image>
        </draw:frame>
        <draw:frame draw:style-name="gr71" draw:text-style-name="P11" draw:layer="layout" svg:width="18.75cm" svg:height="3.323cm" svg:x="1.125cm" svg:y="22.301cm">
          <draw:text-box>
            <text:p text:style-name="P1"><text:span text:style-name="T13">Estão disponíveis novas opções de navegação em Gestão de Alunos, permitindo ir diretamente para a o módulo com os dados do aluno. Assim não é necessário navegar entre as páginas do sistema se o usuário já tiver pesquisado o estudante.</text:span><text:span text:style-name="T13"><text:line-break/></text:span><text:span text:style-name="T13"><text:line-break/></text:span><text:span text:style-name="T13">Novas opções podem ser adicionadas se necessário. Envie sua sugestão através do </text:span><text:span text:style-name="T14"><text:a xlink:href="https://forms.gle/RFphjRA6MUVdhvL69" xlink:type="simple">formulário de sugestões</text:a></text:span><text:span text:style-name="T14">.</text:span></text:p>
          </draw:text-box>
        </draw:frame>
        <draw:custom-shape draw:style-name="gr72" draw:text-style-name="P13" draw:layer="layout" svg:width="1.175cm" svg:height="0.689cm" svg:x="18.554cm" svg:y="19.75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adrão">
        <draw:frame draw:style-name="gr73" draw:text-style-name="P2" draw:layer="layout" svg:width="18.75cm" svg:height="0.947cm" svg:x="1.125cm" svg:y="2.555cm">
          <draw:text-box>
            <text:p text:style-name="P1"><text:span text:style-name="T3">Pesquisa por pais/responsáveis</text:span></text:p>
          </draw:text-box>
        </draw:frame>
        <draw:frame draw:style-name="gr74" draw:text-style-name="P6" draw:layer="layout" svg:width="18.256cm" svg:height="6.853cm" svg:x="1.372cm" svg:y="3.897cm">
          <draw:image xlink:href="Pictures/1000000100000330000001D15049BF70.png" xlink:type="simple" xlink:show="embed" xlink:actuate="onLoad" draw:mime-type="image/png">
            <text:p/>
          </draw:image>
        </draw:frame>
        <draw:custom-shape draw:style-name="gr75" draw:text-style-name="P13" draw:layer="layout" svg:width="4.489cm" svg:height="0.439cm" svg:x="12.476cm" svg:y="8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11" draw:layer="layout" svg:width="18.75cm" svg:height="1.275cm" svg:x="1.125cm" svg:y="11.451cm">
          <draw:text-box>
            <text:p text:style-name="P1"><text:span text:style-name="T8">No módulo de Movimentação a nova opção permite pesquisar os dados dos responsáveis de forma direta sem ter que navegar pelo módulo Gestão de Alunos.</text:span></text:p>
          </draw:text-box>
        </draw:frame>
        <draw:frame draw:style-name="gr77" draw:text-style-name="P4" draw:layer="layout" svg:width="10.375cm" svg:height="0.85cm" svg:x="5.314cm" svg:y="1.15cm">
          <draw:text-box>
            <text:p text:style-name="P3"><text:span text:style-name="T6">Demonstração das Funcionalidades</text:span></text:p>
          </draw:text-box>
        </draw:frame>
        <draw:frame draw:style-name="gr78" draw:text-style-name="P11" draw:layer="layout" svg:width="18.75cm" svg:height="4.859cm" svg:x="1.125cm" svg:y="22.252cm">
          <draw:text-box>
            <text:p text:style-name="P1"><text:span text:style-name="T8">Será carregada a página de pesquisa de responsáveis. É possível editar os dados do responsável assim como na página Gestão de Alunos, mas o usuário não conseguirá modificar o vínculo da pessoa para o estudante. Isso é necessário para garantir que não haverá modificação de forma acidental do mesmo.</text:span></text:p>
            <text:p text:style-name="P1"><text:span text:style-name="T8"/></text:p>
            <text:p text:style-name="P1"><text:span text:style-name="T8">A lista de alunos listados por responsável também permite a navegação para pesquisar o nome do estudante no módulo de trajetória de movimentações. Basta clicar no nome do estudante para realizar a pesquisa.</text:span></text:p>
            <text:p text:style-name="P1"><text:span text:style-name="T8"/></text:p>
          </draw:text-box>
        </draw:frame>
        <draw:frame draw:style-name="gr5" draw:text-style-name="P6" draw:layer="layout" svg:width="18.249cm" svg:height="7.831cm" svg:x="1.5cm" svg:y="13.369cm">
          <draw:image xlink:href="Pictures/10000001000003680000015CC283182B.png" xlink:type="simple" xlink:show="embed" xlink:actuate="onLoad" draw:mime-type="image/png">
            <text:p/>
          </draw:image>
        </draw:frame>
        <draw:custom-shape draw:style-name="gr79" draw:text-style-name="P13" draw:layer="layout" svg:width="3.922cm" svg:height="0.439cm" svg:x="1.578cm" svg:y="19.01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Padrão">
        <draw:custom-shape draw:style-name="gr80" draw:text-style-name="P15" draw:layer="layout" svg:width="10.65cm" svg:height="7.75cm" svg:x="1.175cm" svg:y="14.25cm">
          <text:p/>
          <draw:enhanced-geometry svg:viewBox="0 0 21600 21600" draw:type="rectangle" draw:enhanced-path="M 0 0 L 21600 0 21600 21600 0 21600 0 0 Z N"/>
        </draw:custom-shape>
        <draw:frame draw:style-name="gr81" draw:text-style-name="P2" draw:layer="layout" svg:width="18.75cm" svg:height="0.947cm" svg:x="1.125cm" svg:y="2.355cm">
          <draw:text-box>
            <text:p text:style-name="P1"><text:span text:style-name="T3">Formulários por turma</text:span></text:p>
          </draw:text-box>
        </draw:frame>
        <draw:frame draw:style-name="gr82" draw:text-style-name="P4" draw:layer="layout" svg:width="10.375cm" svg:height="0.85cm" svg:x="5.314cm" svg:y="1.15cm">
          <draw:text-box>
            <text:p text:style-name="P3"><text:span text:style-name="T6">Demonstração das Funcionalidades</text:span></text:p>
          </draw:text-box>
        </draw:frame>
        <draw:frame draw:style-name="gr83" draw:text-style-name="P11" draw:layer="layout" svg:width="18.75cm" svg:height="4.859cm" svg:x="1.125cm" svg:y="3.452cm">
          <draw:text-box>
            <text:p text:style-name="P1"><text:span text:style-name="T8">Novos formulários estão disponíveis no módulo de formulários de escrituração e relatórios.</text:span><text:span text:style-name="T8"><text:line-break/></text:span><text:span text:style-name="T8">Ao selecionar a opção formulários por turma, após filtrar a turma desejada, serão exibidos.</text:span></text:p>
          </draw:text-box>
        </draw:frame>
        <draw:frame draw:style-name="gr84" draw:text-style-name="P4" draw:layer="layout" svg:width="3.49cm" svg:height="0.85cm" svg:x="16.5cm" svg:y="27.85cm">
          <draw:text-box>
            <text:p text:style-name="P3"><text:span text:style-name="T6">13/09/2025</text:span></text:p>
          </draw:text-box>
        </draw:frame>
        <draw:frame draw:style-name="gr85" draw:text-style-name="P18" draw:layer="layout" svg:width="13cm" svg:height="1.237cm" svg:x="4cm" svg:y="26cm">
          <draw:text-box>
            <text:p text:style-name="P14"><text:span text:style-name="T4">Sugestões? Dúvidas? Problemas ou críticas?</text:span></text:p>
            <text:p text:style-name="P10"><text:span text:style-name="T3"><text:a xlink:href="https://forms.gle/RFphjRA6MUVdhvL69" xlink:type="simple">Clique aqui para preencher o formulário de sugestões</text:a></text:span><text:span text:style-name="T5">. </text:span></text:p>
          </draw:text-box>
        </draw:frame>
        <draw:g draw:style-name="gr38">
          <draw:frame draw:style-name="gr5" draw:text-style-name="P6" draw:layer="layout" svg:width="18.749cm" svg:height="7.842cm" svg:x="1.126cm" svg:y="5.853cm">
            <draw:image xlink:href="Pictures/10000001000003C40000018EA197FE30.png" xlink:type="simple" xlink:show="embed" xlink:actuate="onLoad" draw:mime-type="image/png">
              <text:p/>
            </draw:image>
          </draw:frame>
          <draw:custom-shape draw:style-name="gr86" draw:text-style-name="P13" draw:layer="layout" svg:width="2.507cm" svg:height="0.439cm" svg:x="1.252cm" svg:y="10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3" draw:layer="layout" svg:width="3.331cm" svg:height="0.439cm" svg:x="1.252cm" svg:y="10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4" draw:layer="layout" svg:width="10.602cm" svg:height="7.07cm" svg:x="1.199cm" svg:y="14.59cm">
          <draw:image xlink:href="Pictures/10000001000004C60000032FC2FBDC28.png" xlink:type="simple" xlink:show="embed" xlink:actuate="onLoad" draw:mime-type="image/png">
            <text:p/>
          </draw:image>
        </draw:frame>
        <draw:frame draw:style-name="gr88" draw:text-style-name="P14" draw:layer="layout" svg:width="7.729cm" svg:height="11cm" svg:x="12cm" svg:y="14.2cm">
          <draw:image xlink:href="Pictures/10000001000002300000031DDF7B36C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9T12:56:38.739000000</meta:creation-date>
    <dc:date>2025-11-11T16:11:55.440000000</dc:date>
    <meta:editing-duration>PT8H26M46S</meta:editing-duration>
    <meta:editing-cycles>48</meta:editing-cycles>
    <meta:generator>LibreOffice/24.2.2.2$Windows_X86_64 LibreOffice_project/d56cc158d8a96260b836f100ef4b4ef25d6f1a01</meta:generator>
    <meta:print-date>2025-06-06T13:29:25.789000000</meta:print-date>
    <meta:printed-by>Arquivos PDF</meta:printed-by>
    <meta:document-statistic meta:object-count="110"/>
  </office:meta>
</office:document-meta>
</file>